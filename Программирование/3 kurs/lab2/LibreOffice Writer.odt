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it Unit1;</text:p>
      <text:p text:style-name="Standard"/>
      <text:p text:style-name="Standard">{$mode objfpc}{$H+}</text:p>
      <text:p text:style-name="Standard"/>
      <text:p text:style-name="Standard">interface</text:p>
      <text:p text:style-name="Standard"/>
      <text:p text:style-name="Standard">uses</text:p>
      <text:p text:style-name="Standard"><text:s text:c="2"/>Classes, SysUtils, LResources, Forms, Controls, Graphics, Dialogs, StdCtrls,</text:p>
      <text:p text:style-name="Standard"><text:s text:c="2"/>Menus, ExtCtrls,Interfaces;</text:p>
      <text:p text:style-name="Standard"/>
      <text:p text:style-name="Standard">type</text:p>
      <text:p text:style-name="Standard"/>
      <text:p text:style-name="Standard"><text:s text:c="2"/>{ TForm1 }</text:p>
      <text:p text:style-name="Standard"/>
      <text:p text:style-name="Standard"><text:s text:c="2"/>TForm1 = class(TForm)</text:p>
      <text:p text:style-name="Standard"><text:s text:c="4"/>procedure FormCreate(Sender: TObject);</text:p>
      <text:p text:style-name="Standard"><text:s text:c="4"/>procedure FormResize(Sender: TObject);</text:p>
      <text:p text:style-name="Standard"><text:s text:c="4"/>procedure bDemoPlusClick(Sender: TObject);</text:p>
      <text:p text:style-name="Standard"><text:s text:c="4"/>procedure bDemoMinusClick(Sender: TObject);</text:p>
      <text:p text:style-name="Standard"><text:s text:c="4"/>procedure eHeightEditingDone(Sender: TObject);</text:p>
      <text:p text:style-name="Standard"><text:s text:c="4"/>procedure eWidthEditingDone(Sender: TObject);</text:p>
      <text:p text:style-name="Standard"><text:s text:c="4"/>procedure FormChangeBounds(Sender: TObject);</text:p>
      <text:p text:style-name="Standard"><text:s text:c="4"/>procedure timeSizeTimer(Sender: TObject);</text:p>
      <text:p text:style-name="Standard"><text:s text:c="2"/>private</text:p>
      <text:p text:style-name="Standard"><text:s text:c="4"/>FMinW, FMaxW: Integer;</text:p>
      <text:p text:style-name="Standard"><text:s text:c="4"/>FMinH, FMaxH: Integer;</text:p>
      <text:p text:style-name="Standard"><text:s text:c="4"/>FStep: Integer;</text:p>
      <text:p text:style-name="Standard"><text:s text:c="4"/>FMode: Integer;</text:p>
      <text:p text:style-name="Standard"><text:s text:c="4"/>Panel1: TPanel;</text:p>
      <text:p text:style-name="Standard"><text:s text:c="4"/>bDemoPlus, bDemoMinus: TButton;</text:p>
      <text:p text:style-name="Standard"><text:s text:c="4"/>eHeight, eWidth: TEdit;</text:p>
      <text:p text:style-name="Standard"><text:s text:c="4"/>Label1, labelH: TLabel;</text:p>
      <text:p text:style-name="Standard"><text:s text:c="4"/>timeSize: TTimer; <text:s/>// Добавили таймер в класс</text:p>
      <text:p text:style-name="Standard"><text:s text:c="4"/>procedure CenterForm;</text:p>
      <text:p text:style-name="Standard"><text:s text:c="4"/>procedure CenterPanel;</text:p>
      <text:p text:style-name="Standard"><text:s text:c="4"/>procedure UpdateEdits;</text:p>
      <text:p text:style-name="Standard"><text:s text:c="4"/>procedure LockControls(Alock: Boolean);</text:p>
      <text:p text:style-name="Standard"><text:s text:c="2"/>public</text:p>
      <text:p text:style-name="Standard"><text:s text:c="2"/>end;</text:p>
      <text:p text:style-name="Standard"/>
      <text:p text:style-name="Standard">var</text:p>
      <text:p text:style-name="Standard"><text:s text:c="2"/>Form1: TForm1;</text:p>
      <text:p text:style-name="Standard"/>
      <text:p text:style-name="Standard">implementation</text:p>
      <text:p text:style-name="Standard"/>
      <text:p text:style-name="Standard">{ TForm1 }</text:p>
      <text:p text:style-name="Standard"/>
      <text:p text:style-name="Standard">procedure TForm1.FormCreate(Sender: TObject);</text:p>
      <text:p text:style-name="Standard">begin</text:p>
      <text:p text:style-name="Standard"><text:s text:c="2"/>Width := 500;</text:p>
      <text:p text:style-name="Standard"><text:s text:c="2"/>Height := 100;</text:p>
      <text:p text:style-name="Standard"><text:s text:c="2"/>FMinW := 500;</text:p>
      <text:p text:style-name="Standard"><text:soft-page-break/><text:s text:c="2"/>FMaxW := 1000;</text:p>
      <text:p text:style-name="Standard"><text:s text:c="2"/>FMinH := 100;</text:p>
      <text:p text:style-name="Standard"><text:s text:c="2"/>FMaxH := 500;</text:p>
      <text:p text:style-name="Standard"/>
      <text:p text:style-name="Standard"><text:s text:c="2"/>Constraints.MinWidth := FMinW;</text:p>
      <text:p text:style-name="Standard"><text:s text:c="2"/>Constraints.MaxWidth := FMaxW;</text:p>
      <text:p text:style-name="Standard"><text:s text:c="2"/>Constraints.MinHeight := FMinH;</text:p>
      <text:p text:style-name="Standard"><text:s text:c="2"/>Constraints.MaxHeight := FMaxH;</text:p>
      <text:p text:style-name="Standard"><text:s text:c="2"/>FStep := 1;</text:p>
      <text:p text:style-name="Standard"><text:s text:c="2"/>// Создание компонентов программно</text:p>
      <text:p text:style-name="Standard"><text:s text:c="2"/>// Панель</text:p>
      <text:p text:style-name="Standard"><text:s text:c="2"/>Panel1 := TPanel.Create(Self);</text:p>
      <text:p text:style-name="Standard"><text:s text:c="2"/>Panel1.Parent := Self;</text:p>
      <text:p text:style-name="Standard"><text:s text:c="2"/>Panel1.Width := 505;</text:p>
      <text:p text:style-name="Standard"><text:s text:c="2"/>Panel1.Height := 105;</text:p>
      <text:p text:style-name="Standard"><text:s text:c="2"/>Panel1.Left := (ClientWidth - Panel1.Width) div 2;</text:p>
      <text:p text:style-name="Standard"><text:s text:c="2"/>Panel1.Top := (ClientHeight - Panel1.Height) div 2;</text:p>
      <text:p text:style-name="Standard"><text:s text:c="2"/>Panel1.Caption := '';</text:p>
      <text:p text:style-name="Standard"/>
      <text:p text:style-name="Standard"><text:s text:c="2"/>//текст - ширина</text:p>
      <text:p text:style-name="Standard"><text:s text:c="2"/>Label1 := TLabel.Create(Self);</text:p>
      <text:p text:style-name="Standard"><text:s text:c="2"/>Label1.Parent := Panel1;</text:p>
      <text:p text:style-name="Standard"><text:s text:c="2"/>Label1.Caption := 'Ширина:';</text:p>
      <text:p text:style-name="Standard"><text:s text:c="2"/>Label1.Top := 25;</text:p>
      <text:p text:style-name="Standard"><text:s text:c="2"/>Label1.Left := 10;</text:p>
      <text:p text:style-name="Standard"/>
      <text:p text:style-name="Standard"><text:s text:c="2"/>//текст - высота</text:p>
      <text:p text:style-name="Standard"><text:s text:c="2"/>labelH := TLabel.Create(Self);</text:p>
      <text:p text:style-name="Standard"><text:s text:c="2"/>labelH.Parent := Panel1;</text:p>
      <text:p text:style-name="Standard"><text:s text:c="2"/>labelH.Caption := 'Высота:';</text:p>
      <text:p text:style-name="Standard"><text:s text:c="2"/>labelH.Top := 55;</text:p>
      <text:p text:style-name="Standard"><text:s text:c="2"/>labelH.Left := 10;</text:p>
      <text:p text:style-name="Standard"/>
      <text:p text:style-name="Standard"><text:s text:c="2"/>//текстбокс - ширина</text:p>
      <text:p text:style-name="Standard"><text:s text:c="2"/>eWidth := TEdit.Create(Self);</text:p>
      <text:p text:style-name="Standard"><text:s text:c="2"/>eWidth.Parent := Panel1;</text:p>
      <text:p text:style-name="Standard"><text:s text:c="2"/>eWidth.Top := 20;</text:p>
      <text:p text:style-name="Standard"><text:s text:c="2"/>eWidth.Left := 70;</text:p>
      <text:p text:style-name="Standard"><text:s text:c="2"/>eWidth.Width := 100;</text:p>
      <text:p text:style-name="Standard"><text:s text:c="2"/>eWidth.Text := IntToStr(Width);</text:p>
      <text:p text:style-name="Standard"><text:s text:c="2"/>eWidth.OnEditingDone := @eWidthEditingDone;</text:p>
      <text:p text:style-name="Standard"/>
      <text:p text:style-name="Standard"><text:s text:c="2"/>//текстбокс - высота</text:p>
      <text:p text:style-name="Standard"><text:s text:c="2"/>eHeight := TEdit.Create(Self);</text:p>
      <text:p text:style-name="Standard"><text:s text:c="2"/>eHeight.Parent := Panel1;</text:p>
      <text:p text:style-name="Standard"><text:s text:c="2"/>eHeight.Top := 60;</text:p>
      <text:p text:style-name="Standard"><text:s text:c="2"/>eHeight.Left := 70;</text:p>
      <text:p text:style-name="Standard"><text:s text:c="2"/>eHeight.Width := 100;</text:p>
      <text:p text:style-name="Standard"><text:s text:c="2"/>eHeight.Text := IntToStr(Height);</text:p>
      <text:p text:style-name="Standard"><text:s text:c="2"/>eHeight.OnEditingDone := @eHeightEditingDone;</text:p>
      <text:p text:style-name="Standard"/>
      <text:p text:style-name="Standard"><text:s text:c="2"/>// кнопка - увеличение</text:p>
      <text:p text:style-name="Standard"><text:soft-page-break/><text:s text:c="2"/>bDemoPlus := TButton.Create(Self);</text:p>
      <text:p text:style-name="Standard"><text:s text:c="2"/>bDemoPlus.Parent := Panel1;</text:p>
      <text:p text:style-name="Standard"><text:s text:c="2"/>bDemoPlus.Caption := 'Демо+';</text:p>
      <text:p text:style-name="Standard"><text:s text:c="2"/>bDemoPlus.Top := 60;</text:p>
      <text:p text:style-name="Standard"><text:s text:c="2"/>bDemoPlus.Left := 200;</text:p>
      <text:p text:style-name="Standard"><text:s text:c="2"/>bDemoPlus.OnClick := @bDemoPlusClick;</text:p>
      <text:p text:style-name="Standard"/>
      <text:p text:style-name="Standard"><text:s text:c="2"/>//кнопка - уменьшение</text:p>
      <text:p text:style-name="Standard"><text:s text:c="2"/>bDemoMinus := TButton.Create(Self);</text:p>
      <text:p text:style-name="Standard"><text:s text:c="2"/>bDemoMinus.Parent := Panel1;</text:p>
      <text:p text:style-name="Standard"><text:s text:c="2"/>bDemoMinus.Caption := 'Демо-';</text:p>
      <text:p text:style-name="Standard"><text:s text:c="2"/>bDemoMinus.Top := 20;</text:p>
      <text:p text:style-name="Standard"><text:s text:c="2"/>bDemoMinus.Left := 200;</text:p>
      <text:p text:style-name="Standard"><text:s text:c="2"/>bDemoMinus.OnClick := @bDemoMinusClick;</text:p>
      <text:p text:style-name="Standard"/>
      <text:p text:style-name="Standard"><text:s text:c="2"/>//кнопка - таймер</text:p>
      <text:p text:style-name="Standard"><text:s text:c="2"/>timeSize := TTimer.Create(Self);</text:p>
      <text:p text:style-name="Standard"><text:s text:c="2"/>timeSize.Enabled := False;</text:p>
      <text:p text:style-name="Standard"><text:s text:c="2"/>timeSize.Interval := 20;</text:p>
      <text:p text:style-name="Standard"><text:s text:c="2"/>timeSize.OnTimer := @timeSizeTimer;</text:p>
      <text:p text:style-name="Standard"/>
      <text:p text:style-name="Standard"/>
      <text:p text:style-name="Standard"><text:s text:c="2"/>CenterForm;</text:p>
      <text:p text:style-name="Standard"><text:s text:c="2"/>UpdateEdits;</text:p>
      <text:p text:style-name="Standard">end;</text:p>
      <text:p text:style-name="Standard"/>
      <text:p text:style-name="Standard">procedure TForm1.CenterPanel;</text:p>
      <text:p text:style-name="Standard">begin</text:p>
      <text:p text:style-name="Standard"><text:s text:c="2"/>Panel1.Left := (ClientWidth - Panel1.Width) div 2;</text:p>
      <text:p text:style-name="Standard"><text:s text:c="2"/>Panel1.Top := (ClientHeight - Panel1.Height) div 2;</text:p>
      <text:p text:style-name="Standard">end;</text:p>
      <text:p text:style-name="Standard"/>
      <text:p text:style-name="Standard">procedure TForm1.CenterForm;</text:p>
      <text:p text:style-name="Standard">begin</text:p>
      <text:p text:style-name="Standard"><text:s text:c="2"/>Left := (Screen.Width - Width) div 2;</text:p>
      <text:p text:style-name="Standard"><text:s text:c="2"/>Top := (Screen.Height - Height) div 2;</text:p>
      <text:p text:style-name="Standard">end;</text:p>
      <text:p text:style-name="Standard"/>
      <text:p text:style-name="Standard">procedure TForm1.UpdateEdits;</text:p>
      <text:p text:style-name="Standard">begin</text:p>
      <text:p text:style-name="Standard"><text:s text:c="2"/>eWidth.Text := IntToStr(Width);</text:p>
      <text:p text:style-name="Standard"><text:s text:c="2"/>eHeight.Text := IntToStr(Height);</text:p>
      <text:p text:style-name="Standard">end;</text:p>
      <text:p text:style-name="Standard"/>
      <text:p text:style-name="Standard">procedure TForm1.LockControls(ALock: Boolean);</text:p>
      <text:p text:style-name="Standard">begin</text:p>
      <text:p text:style-name="Standard"><text:s text:c="2"/>eWidth.Enabled := not ALock;</text:p>
      <text:p text:style-name="Standard"><text:s text:c="2"/>eHeight.Enabled := not ALock;</text:p>
      <text:p text:style-name="Standard"><text:s text:c="2"/>bDemoPlus.Enabled := not ALock;</text:p>
      <text:p text:style-name="Standard"><text:s text:c="2"/>bDemoMinus.Enabled := not ALock;</text:p>
      <text:p text:style-name="Standard">end;</text:p>
      <text:p text:style-name="Standard"/>
      <text:p text:style-name="Standard"><text:soft-page-break/>procedure TForm1.bDemoPlusClick(Sender: TObject);</text:p>
      <text:p text:style-name="Standard">begin</text:p>
      <text:p text:style-name="Standard"><text:s text:c="2"/>FMode := 1;</text:p>
      <text:p text:style-name="Standard"><text:s text:c="2"/>LockControls(True);</text:p>
      <text:p text:style-name="Standard"><text:s text:c="2"/>timeSize.Enabled := True;</text:p>
      <text:p text:style-name="Standard">end;</text:p>
      <text:p text:style-name="Standard"/>
      <text:p text:style-name="Standard">procedure TForm1.bDemoMinusClick(Sender: TObject);</text:p>
      <text:p text:style-name="Standard">begin</text:p>
      <text:p text:style-name="Standard"><text:s text:c="2"/>FMode := -1;</text:p>
      <text:p text:style-name="Standard"><text:s text:c="2"/>LockControls(True);</text:p>
      <text:p text:style-name="Standard"><text:s text:c="2"/>timeSize.Enabled := True;</text:p>
      <text:p text:style-name="Standard">end;</text:p>
      <text:p text:style-name="Standard"/>
      <text:p text:style-name="Standard">procedure TForm1.eHeightEditingDone(Sender: TObject);</text:p>
      <text:p text:style-name="Standard">var</text:p>
      <text:p text:style-name="Standard"><text:s text:c="2"/>v: Integer;</text:p>
      <text:p text:style-name="Standard">begin</text:p>
      <text:p text:style-name="Standard"><text:s text:c="2"/>if TryStrToInt(eHeight.Text, v) then</text:p>
      <text:p text:style-name="Standard"><text:s text:c="2"/>begin</text:p>
      <text:p text:style-name="Standard"><text:s text:c="4"/>if v &lt; FMinH then v := FMinH;</text:p>
      <text:p text:style-name="Standard"><text:s text:c="4"/>if v &gt; FMaxH then v := FMaxH;</text:p>
      <text:p text:style-name="Standard"><text:s text:c="4"/>Height := v;</text:p>
      <text:p text:style-name="Standard"><text:s text:c="2"/>end</text:p>
      <text:p text:style-name="Standard"><text:s text:c="2"/>else</text:p>
      <text:p text:style-name="Standard"><text:s text:c="4"/>eHeight.Text := IntToStr(Height);</text:p>
      <text:p text:style-name="Standard">end;</text:p>
      <text:p text:style-name="Standard"/>
      <text:p text:style-name="Standard">procedure TForm1.eWidthEditingDone(Sender: TObject);</text:p>
      <text:p text:style-name="Standard">var</text:p>
      <text:p text:style-name="Standard"><text:s text:c="2"/>v: Integer;</text:p>
      <text:p text:style-name="Standard">begin</text:p>
      <text:p text:style-name="Standard"><text:s text:c="2"/>if TryStrToInt(eWidth.Text, v) then</text:p>
      <text:p text:style-name="Standard"><text:s text:c="2"/>begin</text:p>
      <text:p text:style-name="Standard"><text:s text:c="4"/>if v &lt; FMinW then v := FMinW;</text:p>
      <text:p text:style-name="Standard"><text:s text:c="4"/>if v &gt; FMaxW then v := FMaxW;</text:p>
      <text:p text:style-name="Standard"><text:s text:c="4"/>Width := v;</text:p>
      <text:p text:style-name="Standard"><text:s text:c="2"/>end</text:p>
      <text:p text:style-name="Standard"><text:s text:c="2"/>else</text:p>
      <text:p text:style-name="Standard"><text:s text:c="4"/>eWidth.Text := IntToStr(Width);</text:p>
      <text:p text:style-name="Standard">end;</text:p>
      <text:p text:style-name="Standard"/>
      <text:p text:style-name="Standard">procedure TForm1.FormChangeBounds(Sender: TObject);</text:p>
      <text:p text:style-name="Standard">begin</text:p>
      <text:p text:style-name="Standard"><text:s text:c="2"/>CenterForm;</text:p>
      <text:p text:style-name="Standard"><text:s text:c="2"/>UpdateEdits;</text:p>
      <text:p text:style-name="Standard"><text:s text:c="2"/>CenterPanel;</text:p>
      <text:p text:style-name="Standard">end;</text:p>
      <text:p text:style-name="Standard"/>
      <text:p text:style-name="Standard">procedure TForm1.FormResize(Sender: TObject);</text:p>
      <text:p text:style-name="Standard">begin</text:p>
      <text:p text:style-name="Standard"><text:s text:c="2"/>UpdateEdits;</text:p>
      <text:p text:style-name="Standard"><text:soft-page-break/><text:s text:c="2"/>CenterPanel;</text:p>
      <text:p text:style-name="Standard">end;</text:p>
      <text:p text:style-name="Standard"/>
      <text:p text:style-name="Standard">procedure TForm1.timeSizeTimer(Sender: TObject);</text:p>
      <text:p text:style-name="Standard">begin</text:p>
      <text:p text:style-name="Standard"><text:s text:c="2"/>if FMode = 1 then</text:p>
      <text:p text:style-name="Standard"><text:s text:c="2"/>begin</text:p>
      <text:p text:style-name="Standard"><text:s text:c="4"/>if (Width &lt; FMaxW) then</text:p>
      <text:p text:style-name="Standard"><text:s text:c="6"/>Width := Width + FStep;</text:p>
      <text:p text:style-name="Standard"><text:s text:c="4"/>if (Height &lt; FMaxH) then</text:p>
      <text:p text:style-name="Standard"><text:s text:c="6"/>Height := Height + FStep;</text:p>
      <text:p text:style-name="Standard"/>
      <text:p text:style-name="Standard"><text:s text:c="4"/>if (Width = FMaxW) and (Height = FMaxH) then</text:p>
      <text:p text:style-name="Standard"><text:s text:c="4"/>begin</text:p>
      <text:p text:style-name="Standard"><text:s text:c="6"/>timeSize.Enabled := False;</text:p>
      <text:p text:style-name="Standard"><text:s text:c="6"/>LockControls(False);</text:p>
      <text:p text:style-name="Standard"><text:s text:c="4"/>end;</text:p>
      <text:p text:style-name="Standard"><text:s text:c="2"/>end</text:p>
      <text:p text:style-name="Standard"><text:s text:c="2"/>else if FMode = -1 then</text:p>
      <text:p text:style-name="Standard"><text:s text:c="2"/>begin</text:p>
      <text:p text:style-name="Standard"><text:s text:c="4"/>if (Width &gt; FMinW) then</text:p>
      <text:p text:style-name="Standard"><text:s text:c="6"/>Width := Width - FStep;</text:p>
      <text:p text:style-name="Standard"><text:s text:c="4"/>if (Height &gt; FMinH) then</text:p>
      <text:p text:style-name="Standard"><text:s text:c="6"/>Height := Height - FStep;</text:p>
      <text:p text:style-name="Standard"/>
      <text:p text:style-name="Standard"><text:s text:c="4"/>if (Width = FMinW) and (Height = FMinH) then</text:p>
      <text:p text:style-name="Standard"><text:s text:c="4"/>begin</text:p>
      <text:p text:style-name="Standard"><text:s text:c="6"/>timeSize.Enabled := False;</text:p>
      <text:p text:style-name="Standard"><text:s text:c="6"/>LockControls(False);</text:p>
      <text:p text:style-name="Standard"><text:s text:c="4"/>end;</text:p>
      <text:p text:style-name="Standard"><text:s text:c="2"/>end;</text:p>
      <text:p text:style-name="Standard">end;</text:p>
      <text:p text:style-name="Standard"/>
      <text:p text:style-name="Standard">initialization</text:p>
      <text:p text:style-name="Standard"><text:s text:c="2"/>{$I unit1.lrs}</text:p>
      <text:p text:style-name="Standard"/>
      <text:p text:style-name="Standard">en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Anton Boyarshinov</meta:initial-creator>
    <meta:creation-date>2008-09-02T15:39:21</meta:creation-date>
    <dc:date>2026-02-16T08:42:56.950089224</dc:date>
    <meta:editing-cycles>2</meta:editing-cycles>
    <meta:editing-duration>PT2M14S</meta:editing-duration>
    <meta:document-statistic meta:table-count="0" meta:image-count="0" meta:object-count="0" meta:page-count="5" meta:paragraph-count="210" meta:word-count="585" meta:character-count="4986" meta:non-whitespace-character-count="4176"/>
    <meta:user-defined meta:name="Поле 1"/>
    <meta:user-defined meta:name="Поле 2"/>
    <meta:user-defined meta:name="Поле 3"/>
    <meta:user-defined meta:name="Поле 4"/>
  </office:meta>
</office:document-meta>
</file>